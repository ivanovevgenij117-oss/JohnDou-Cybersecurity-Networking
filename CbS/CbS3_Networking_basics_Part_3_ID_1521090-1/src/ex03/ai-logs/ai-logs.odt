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157cm"/>
    </style:style>
    <style:style style:name="Таблица1.B" style:family="table-column">
      <style:table-column-properties style:column-width="4.563cm"/>
    </style:style>
    <style:style style:name="Таблица1.C" style:family="table-column">
      <style:table-column-properties style:column-width="2.97cm"/>
    </style:style>
    <style:style style:name="Таблица1.D" style:family="table-column">
      <style:table-column-properties style:column-width="3.124cm"/>
    </style:style>
    <style:style style:name="Таблица1.E" style:family="table-column">
      <style:table-column-properties style:column-width="3.186cm"/>
    </style:style>
    <style:style style:name="Таблица1.A1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dcdfe5"/>
    </style:style>
    <style:style style:name="Таблица1.A5" style:family="table-cell">
      <style:table-cell-properties style:vertical-align="middle" fo:padding="0cm" fo:border="none"/>
    </style:style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2" style:family="paragraph" style:parent-style-name="Preformatted_20_Text">
      <style:paragraph-properties fo:margin-top="0cm" fo:margin-bottom="0cm" style:contextual-spacing="false" fo:padding="0cm" fo:border="none" style:writing-mode="lr-tb"/>
    </style:style>
    <style:style style:name="P3" style:family="paragraph" style:parent-style-name="Quotations">
      <style:paragraph-properties fo:margin-left="1.931cm" fo:margin-right="1.931cm" fo:margin-top="0cm" fo:margin-bottom="0cm" style:contextual-spacing="false" fo:text-indent="0cm" style:auto-text-indent="false" fo:padding="0cm" fo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margin-top="0.84cm" fo:margin-bottom="0.28cm" style:contextual-spacing="false" fo:text-indent="0cm" style:auto-text-indent="false"/>
      <style:text-properties style:text-line-through-style="none" style:text-line-through-type="none" style:font-name="Google Sans" fo:font-size="13.1999998092651pt" style:text-underline-style="none" fo:font-weight="bold" officeooo:paragraph-rsid="000d446b" style:text-blinking="false" loext:padding="0cm" loext:border="none"/>
    </style:style>
    <style:style style:name="P8" style:family="paragraph" style:parent-style-name="Standard">
      <style:paragraph-properties fo:margin-left="0cm" fo:margin-right="0cm" fo:margin-top="0.84cm" fo:margin-bottom="0.28cm" style:contextual-spacing="false" fo:text-indent="0cm" style:auto-text-indent="false"/>
      <style:text-properties style:text-line-through-style="none" style:text-line-through-type="none" style:font-name="Google Sans" fo:font-size="13.1999998092651pt" style:text-underline-style="none" fo:font-weight="bold" officeooo:paragraph-rsid="000d446b" style:text-blinking="false" fo:background-color="#00a933" loext:padding="0cm" loext:border="none"/>
    </style:style>
    <style:style style:name="P9" style:family="paragraph" style:parent-style-name="Standard">
      <style:paragraph-properties fo:margin-left="0cm" fo:margin-right="0cm" fo:margin-top="0.84cm" fo:margin-bottom="0.28cm" style:contextual-spacing="false" fo:text-indent="0cm" style:auto-text-indent="false"/>
      <style:text-properties style:text-line-through-style="none" style:text-line-through-type="none" style:text-underline-style="none" style:text-blinking="false" loext:padding="0cm" loext:border="none"/>
    </style:style>
    <style:style style:name="P10" style:family="paragraph" style:parent-style-name="Standard">
      <style:text-properties style:text-line-through-style="none" style:text-line-through-type="none" style:text-underline-style="none" officeooo:rsid="000fe589" officeooo:paragraph-rsid="000fe589" style:text-blinking="false" loext:padding="0cm" loext:border="none"/>
    </style:style>
    <style:style style:name="P11" style:family="paragraph" style:parent-style-name="Standard">
      <style:text-properties officeooo:rsid="000e5df2" officeooo:paragraph-rsid="000e5df2"/>
    </style:style>
    <style:style style:name="P12" style:family="paragraph" style:parent-style-name="Standard">
      <style:text-properties officeooo:rsid="000fe589" officeooo:paragraph-rsid="000fe589"/>
    </style:style>
    <style:style style:name="P13" style:family="paragraph" style:parent-style-name="Standard">
      <style:paragraph-properties fo:margin-left="0cm" fo:margin-right="0cm" fo:margin-top="0.84cm" fo:margin-bottom="0.28cm" style:contextual-spacing="false" fo:text-indent="0cm" style:auto-text-indent="false"/>
      <style:text-properties officeooo:rsid="000fe589" officeooo:paragraph-rsid="000fe589"/>
    </style:style>
    <style:style style:name="P14" style:family="paragraph" style:parent-style-name="Standard">
      <style:text-properties officeooo:rsid="000fe589" officeooo:paragraph-rsid="0011965d"/>
    </style:style>
    <style:style style:name="P15" style:family="paragraph" style:parent-style-name="Standard">
      <style:text-properties officeooo:rsid="0011965d" officeooo:paragraph-rsid="0011965d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Google Sans" fo:font-size="9.25pt" style:text-underline-style="none" fo:font-weight="normal" style:text-blinking="false"/>
    </style:style>
    <style:style style:name="P19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Google Sans" fo:font-size="9.25pt" style:text-underline-style="none" fo:font-weight="bold" style:text-blinking="false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2" style:family="paragraph" style:parent-style-name="Text_20_body">
      <style:paragraph-properties fo:margin-left="0cm" fo:margin-right="0cm" fo:text-indent="0cm" style:auto-text-indent="false" style:writing-mode="lr-tb"/>
    </style:style>
    <style:style style:name="P23" style:family="paragraph" style:parent-style-name="Text_20_body">
      <style:paragraph-properties fo:margin-left="0cm" fo:margin-right="0cm" fo:margin-top="0.84cm" fo:margin-bottom="0.28cm" style:contextual-spacing="false" fo:text-indent="0cm" style:auto-text-indent="false"/>
      <style:text-properties style:text-line-through-style="none" style:text-line-through-type="none" style:font-name="Google Sans" fo:font-size="13.1999998092651pt" style:text-underline-style="none" fo:font-weight="bold" style:text-blinking="false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Google Sans" fo:font-size="13.1999998092651pt" style:text-underline-style="none" fo:font-weight="bold" style:text-blinking="false" loext:padding="0cm" loext:border="none"/>
    </style:style>
    <style:style style:name="P25" style:family="paragraph" style:parent-style-name="Text_20_body">
      <style:text-properties style:text-line-through-style="none" style:text-line-through-type="none" style:font-name="Google Sans" fo:font-size="10.5500001907349pt" style:text-underline-style="none" fo:font-weight="normal" officeooo:rsid="000fe589" officeooo:paragraph-rsid="000fe589" style:text-blinking="false" loext:padding="0cm" loext:border="none"/>
    </style:style>
    <style:style style:name="P26" style:family="paragraph" style:parent-style-name="Text_20_body">
      <style:paragraph-properties fo:margin-left="0cm" fo:margin-right="0cm" fo:margin-top="0.84cm" fo:margin-bottom="0.28cm" style:contextual-spacing="false" fo:text-indent="0cm" style:auto-text-indent="false"/>
      <style:text-properties style:text-line-through-style="none" style:text-line-through-type="none" style:text-underline-style="none" style:text-blinking="false" loext:padding="0cm" loext:border="none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30" style:family="paragraph" style:parent-style-name="Text_20_body">
      <style:text-properties officeooo:rsid="000e5df2" officeooo:paragraph-rsid="000e5df2"/>
    </style:style>
    <style:style style:name="P3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3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3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3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36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3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3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3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40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41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43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T1" style:family="text">
      <style:text-properties style:text-line-through-style="none" style:text-line-through-type="none" style:font-name="Google Sans" fo:font-size="10.5500001907349pt" style:text-underline-style="none" fo:font-weight="normal" style:text-blinking="false" loext:padding="0cm" loext:border="none"/>
    </style:style>
    <style:style style:name="T2" style:family="text">
      <style:text-properties style:text-line-through-style="none" style:text-line-through-type="none" style:font-name="Google Sans" fo:font-size="10.5500001907349pt" style:text-underline-style="none" fo:font-weight="bold" style:text-blinking="false" loext:padding="0cm" loext:border="none"/>
    </style:style>
    <style:style style:name="T3" style:family="text">
      <style:text-properties style:text-line-through-style="none" style:text-line-through-type="none" style:font-name="Google Sans" fo:font-size="9.25pt" style:text-underline-style="none" fo:font-weight="normal" style:text-blinking="false"/>
    </style:style>
    <style:style style:name="T4" style:family="text">
      <style:text-properties style:text-line-through-style="none" style:text-line-through-type="none" style:font-name="Google Sans" fo:font-size="9.25pt" style:text-underline-style="none" fo:font-weight="normal" style:text-blinking="false" loext:padding="0cm" loext:border="none"/>
    </style:style>
    <style:style style:name="T5" style:family="text">
      <style:text-properties style:text-line-through-style="none" style:text-line-through-type="none" style:font-name="Google Sans" fo:font-size="9.25pt" style:text-underline-style="none" fo:font-weight="bold" style:text-blinking="false" loext:padding="0cm" loext:border="none"/>
    </style:style>
    <style:style style:name="T6" style:family="text">
      <style:text-properties style:text-line-through-style="none" style:text-line-through-type="none" style:font-name="Google Sans" fo:font-size="13.1999998092651pt" style:text-underline-style="none" fo:font-weight="bold" style:text-blinking="false" loext:padding="0cm" loext:border="none"/>
    </style:style>
    <style:style style:name="T7" style:family="text">
      <style:text-properties style:text-line-through-style="none" style:text-line-through-type="none" style:font-name="Google Sans" fo:font-size="13.1999998092651pt" style:text-underline-style="none" fo:font-weight="bold" officeooo:rsid="000d446b" style:text-blinking="false" fo:background-color="#00a933" loext:char-shading-value="0" loext:padding="0cm" loext:border="none"/>
    </style:style>
    <style:style style:name="T8" style:family="text">
      <style:text-properties style:text-line-through-style="none" style:text-line-through-type="none" style:font-name="Google Sans" fo:font-size="13.1999998092651pt" style:text-underline-style="none" fo:font-weight="bold" style:text-blinking="false" fo:background-color="#00a933" loext:char-shading-value="0" loext:padding="0cm" loext:border="none"/>
    </style:style>
    <style:style style:name="T9" style:family="text">
      <style:text-properties style:text-line-through-style="none" style:text-line-through-type="none" style:font-name="monospace" fo:font-size="9.25pt" style:text-underline-style="none" fo:font-weight="normal" style:text-blinking="false" loext:padding="0cm" loext:border="none"/>
    </style:style>
    <style:style style:name="T10" style:family="text">
      <style:text-properties style:text-line-through-style="none" style:text-line-through-type="none" style:font-name="monospace" fo:font-size="9.25pt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11" style:family="text">
      <style:text-properties style:text-line-through-style="none" style:text-line-through-type="none" style:font-name="monospace" fo:font-size="9.25pt" style:text-underline-style="none" fo:font-weight="normal" officeooo:rsid="0011965d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12" style:family="text">
      <style:text-properties style:text-line-through-style="none" style:text-line-through-type="none" style:font-name="monospace" fo:font-size="9.25pt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13" style:family="text">
      <style:text-properties style:text-line-through-style="none" style:text-line-through-type="none" style:font-name="monospace" fo:font-size="9.25pt" style:text-underline-style="none" fo:font-weight="bold" style:text-blinking="false" style:font-weight-asian="bold" style:font-weight-complex="bold" loext:padding-left="0cm" loext:padding-right="0cm" loext:padding-top="0cm" loext:padding-bottom="0.049cm" loext:border-left="none" loext:border-right="none" loext:border-top="none" loext:border-bottom="0.06pt solid #f0f2f5"/>
    </style:style>
    <style:style style:name="T14" style:family="text">
      <style:text-properties style:text-line-through-style="none" style:text-line-through-type="none" style:font-name="monospace" fo:font-size="9.25pt" style:text-underline-style="none" fo:font-weight="bold" officeooo:rsid="0011965d" style:text-blinking="false" style:font-weight-asian="bold" style:font-weight-complex="bold" loext:padding-left="0cm" loext:padding-right="0cm" loext:padding-top="0cm" loext:padding-bottom="0.049cm" loext:border-left="none" loext:border-right="none" loext:border-top="none" loext:border-bottom="0.06pt solid #f0f2f5"/>
    </style:style>
    <style:style style:name="T15" style:family="text">
      <style:text-properties style:text-line-through-style="none" style:text-line-through-type="none" style:font-name="monospace" fo:font-size="9.25pt" style:text-underline-style="none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16" style:family="text">
      <style:text-properties style:text-line-through-style="none" style:text-line-through-type="none" style:text-underline-style="none" style:text-blinking="false" loext:padding="0cm" loext:border="none"/>
    </style:style>
    <style:style style:name="T17" style:family="text">
      <style:text-properties style:font-name="Google Sans" fo:font-size="13.1999998092651pt" fo:font-weight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d446b"/>
    </style:style>
    <style:style style:name="T21" style:family="text">
      <style:text-properties officeooo:rsid="000d4feb"/>
    </style:style>
    <style:style style:name="T22" style:family="text">
      <style:text-properties officeooo:rsid="0011965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0">Задание 1</text:span></text:p>
      <text:p text:style-name="P7">1. План IP-адресации (Промышленный ИБ-стандарт)</text:p>
      <text:p text:style-name="P4"><text:span text:style-name="T1">Для максимальной экономии адресного пространства и защиты от сканирования, все транзитные (линейные) подсети между роутерами мы нарезаем строгой маской </text:span><text:span text:style-name="Strong_20_Emphasis"><text:span text:style-name="Source_20_Text"><text:span text:style-name="T12">/30</text:span></text:span></text:span><text:span text:style-name="Strong_20_Emphasis"><text:span text:style-name="T2"> (255.255.255.252)</text:span></text:span><text:span text:style-name="T1">. Маска </text:span><text:span text:style-name="Source_20_Text"><text:span text:style-name="T10">/30</text:span></text:span><text:span text:style-name="T1"> выделяет в проводе всего 2 полезных IP-адреса, что физически не позволяет хакеру незаметно вклиниться третьим устройством в кабель [Задание 1. Виртуальные сети]. Свободные подсети мы имитируем через виртуальные интерфейсы </text:span><text:span text:style-name="Source_20_Text"><text:span text:style-name="T10">Loopback</text:span></text:span><text:span text:style-name="T1"> с маской </text:span><text:span text:style-name="Strong_20_Emphasis"><text:span text:style-name="Source_20_Text"><text:span text:style-name="T12">/24</text:span></text:span></text:span><text:span text:style-name="Strong_20_Emphasis"><text:span text:style-name="T2"> (255.255.255.0)</text:span></text:span><text:span text:style-name="T1"> [Шаг 1].</text:span></text:p>
      <text:p text:style-name="P9">🛠️ <text:span text:style-name="T17">Сводная таблица распределения IP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9">Сетевой сегмент</text:p>
          </table:table-cell>
          <table:table-cell table:style-name="Таблица1.A1" office:value-type="string">
            <text:p text:style-name="P19">Назначение</text:p>
          </table:table-cell>
          <table:table-cell table:style-name="Таблица1.A1" office:value-type="string">
            <text:p text:style-name="P19">Сеть и Маска</text:p>
          </table:table-cell>
          <table:table-cell table:style-name="Таблица1.A1" office:value-type="string">
            <text:p text:style-name="P19">IP-адрес узла 1</text:p>
          </table:table-cell>
          <table:table-cell table:style-name="Таблица1.A1" office:value-type="string">
            <text:p text:style-name="P19">IP-адрес узла 2</text:p>
          </table:table-cell>
        </table:table-row>
        <table:table-row>
          <table:table-cell table:style-name="Таблица1.A1" office:value-type="string">
            <text:p text:style-name="P16"><text:span text:style-name="Strong_20_Emphasis"><text:span text:style-name="T5">Loopback 0 (на R1)</text:span></text:span></text:p>
          </table:table-cell>
          <table:table-cell table:style-name="Таблица1.A1" office:value-type="string">
            <text:p text:style-name="P18">Свободная подсеть R1</text:p>
          </table:table-cell>
          <table:table-cell table:style-name="Таблица1.A1" office:value-type="string">
            <text:p text:style-name="P17"><text:span text:style-name="Source_20_Text"><text:span text:style-name="T10">192.168.10.0/24</text:span></text:span></text:p>
          </table:table-cell>
          <table:table-cell table:style-name="Таблица1.A1" office:value-type="string">
            <text:p text:style-name="P17"><text:span text:style-name="Strong_20_Emphasis"><text:span text:style-name="Source_20_Text"><text:span text:style-name="T12">192.168.10.1</text:span></text:span></text:span></text:p>
          </table:table-cell>
          <table:table-cell table:style-name="Таблица1.A1" office:value-type="string">
            <text:p text:style-name="P16"><text:span text:style-name="Emphasis"><text:span text:style-name="T4">Виртуальный</text:span></text:span></text:p>
          </table:table-cell>
        </table:table-row>
        <table:table-row>
          <table:table-cell table:style-name="Таблица1.A1" office:value-type="string">
            <text:p text:style-name="P16"><text:span text:style-name="Strong_20_Emphasis"><text:span text:style-name="T5">стык R1 — R2</text:span></text:span></text:p>
          </table:table-cell>
          <table:table-cell table:style-name="Таблица1.A1" office:value-type="string">
            <text:p text:style-name="P18">Первая транзитная магистраль</text:p>
          </table:table-cell>
          <table:table-cell table:style-name="Таблица1.A1" office:value-type="string">
            <text:p text:style-name="P17"><text:span text:style-name="Source_20_Text"><text:span text:style-name="T10">10.10.12.0/30</text:span></text:span></text:p>
          </table:table-cell>
          <table:table-cell table:style-name="Таблица1.A1" office:value-type="string">
            <text:p text:style-name="P17"><text:span text:style-name="Source_20_Text"><text:span text:style-name="T10">10.10.12.1</text:span></text:span><text:span text:style-name="T3"> (на R1)</text:span></text:p>
          </table:table-cell>
          <table:table-cell table:style-name="Таблица1.A1" office:value-type="string">
            <text:p text:style-name="P17"><text:span text:style-name="Source_20_Text"><text:span text:style-name="T10">10.10.12.2</text:span></text:span><text:span text:style-name="T3"> (на R2)</text:span></text:p>
          </table:table-cell>
        </table:table-row>
        <table:table-row>
          <table:table-cell table:style-name="Таблица1.A1" office:value-type="string">
            <text:p text:style-name="P16"><text:span text:style-name="Strong_20_Emphasis"><text:span text:style-name="T5">стык R2 — R3</text:span></text:span></text:p>
          </table:table-cell>
          <table:table-cell table:style-name="Таблица1.A1" office:value-type="string">
            <text:p text:style-name="P18">Вторая транзитная магистраль</text:p>
          </table:table-cell>
          <table:table-cell table:style-name="Таблица1.A1" office:value-type="string">
            <text:p text:style-name="P17"><text:span text:style-name="Source_20_Text"><text:span text:style-name="T10">10.10.23.0/30</text:span></text:span></text:p>
          </table:table-cell>
          <table:table-cell table:style-name="Таблица1.A1" office:value-type="string">
            <text:p text:style-name="P17"><text:span text:style-name="Source_20_Text"><text:span text:style-name="T10">10.10.23.1</text:span></text:span><text:span text:style-name="T3"> (на R2)</text:span></text:p>
          </table:table-cell>
          <table:table-cell table:style-name="Таблица1.A1" office:value-type="string">
            <text:p text:style-name="P17"><text:span text:style-name="Source_20_Text"><text:span text:style-name="T10">10.10.23.2</text:span></text:span><text:span text:style-name="T3"> (на R3)</text:span></text:p>
          </table:table-cell>
        </table:table-row>
        <table:table-row>
          <table:table-cell table:style-name="Таблица1.A5" office:value-type="string">
            <text:p text:style-name="P16"><text:span text:style-name="Strong_20_Emphasis"><text:span text:style-name="T5">Loopback 0 (на R3)</text:span></text:span></text:p>
          </table:table-cell>
          <table:table-cell table:style-name="Таблица1.A5" office:value-type="string">
            <text:p text:style-name="P18">Свободная подсеть R3</text:p>
          </table:table-cell>
          <table:table-cell table:style-name="Таблица1.A5" office:value-type="string">
            <text:p text:style-name="P17"><text:span text:style-name="Source_20_Text"><text:span text:style-name="T10">192.168.30.0/24</text:span></text:span></text:p>
          </table:table-cell>
          <table:table-cell table:style-name="Таблица1.A5" office:value-type="string">
            <text:p text:style-name="P17"><text:span text:style-name="Strong_20_Emphasis"><text:span text:style-name="Source_20_Text"><text:span text:style-name="T12">192.168.30.1</text:span></text:span></text:span></text:p>
          </table:table-cell>
          <table:table-cell table:style-name="Таблица1.A5" office:value-type="string">
            <text:p text:style-name="P16"><text:span text:style-name="Emphasis"><text:span text:style-name="T4">Виртуальный</text:span></text:span></text:p>
          </table:table-cell>
        </table:table-row>
      </table:table>
      <text:p text:style-name="Horizontal_20_Line"/>
      <text:p text:style-name="P23">2. Проектирование областей (Areas) OSPF и ИБ-обоснование</text:p>
      <text:p text:style-name="P26">🚨 <text:span text:style-name="T17">Критический разбор и ловушка для студента:</text:span></text:p>
      <text:p text:style-name="P21"><text:span text:style-name="Emphasis"><text:span text:style-name="T1">Если бы обычный, не заточенный под кибербезопасность ИИ предложил вам разбить эту схему на куски (например, засунуть стык R1-R2 в </text:span></text:span><text:span text:style-name="Emphasis"><text:span text:style-name="Source_20_Text"><text:span text:style-name="T10">area 1</text:span></text:span></text:span><text:span text:style-name="Emphasis"><text:span text:style-name="T1">, а стык R2-R3 в </text:span></text:span><text:span text:style-name="Emphasis"><text:span text:style-name="Source_20_Text"><text:span text:style-name="T10">area 2</text:span></text:span></text:span><text:span text:style-name="Emphasis"><text:span text:style-name="T1">), </text:span></text:span><text:span text:style-name="Emphasis"><text:span text:style-name="Strong_20_Emphasis"><text:span text:style-name="T2">это была бы грубейшая архитектурная ошибка</text:span></text:span></text:span><text:span text:style-name="Emphasis"><text:span text:style-name="T1">.</text:span></text:span></text:p>
      <text:p text:style-name="P21"><text:span text:style-name="T1">В протоколе OSPF действует железный закон: </text:span><text:span text:style-name="Strong_20_Emphasis"><text:span text:style-name="T2">все рядовые области обязаны иметь прямое физическое или логическое подключение к магистральному ядру — </text:span></text:span><text:span text:style-name="Strong_20_Emphasis"><text:span text:style-name="Source_20_Text"><text:span text:style-name="T12">Area 0</text:span></text:span></text:span><text:span text:style-name="Strong_20_Emphasis"><text:span text:style-name="T2"> (Backbone)</text:span></text:span><text:span text:style-name="T1"> [Задание 3. Динамическая маршрутизация]. Если мы сделаем схему </text:span><text:span text:style-name="Source_20_Text"><text:span text:style-name="T10">Area 1</text:span></text:span><text:span text:style-name="T1"> ↔ </text:span><text:span text:style-name="Source_20_Text"><text:span text:style-name="T10">Area 2</text:span></text:span><text:span text:style-name="T1"> без центральной </text:span><text:span text:style-name="Source_20_Text"><text:span text:style-name="T10">Area 0</text:span></text:span><text:span text:style-name="T1"> посередине, алгоритм Дейкстры откажется передавать карты дорог (LSA) между ними для защиты от петель маршрутизации, и сеть полностью ляжет [Задание 3. Динамическая маршрутизация].</text:span></text:p>
      <text:p text:style-name="P26">🛡️ <text:span text:style-name="T17">Наше ИБ-обоснование выбора зон:</text:span></text:p>
      <text:p text:style-name="P21"><text:span text:style-name="T1">Для данной топологии из трех последовательных роутеров мы обязаны использовать </text:span><text:span text:style-name="Strong_20_Emphasis"><text:span text:style-name="T2">строго одну единую область — </text:span></text:span><text:span text:style-name="Strong_20_Emphasis"><text:span text:style-name="Source_20_Text"><text:span text:style-name="T12">Area 0</text:span></text:span></text:span><text:span text:style-name="Strong_20_Emphasis"><text:span text:style-name="T2"> (Команда: </text:span></text:span><text:span text:style-name="Strong_20_Emphasis"><text:span text:style-name="Source_20_Text"><text:span text:style-name="T12">area 0</text:span></text:span></text:span><text:span text:style-name="Strong_20_Emphasis"><text:span text:style-name="T2">)</text:span></text:span><text:span text:style-name="T1"> [Задание 3. Динамическая маршрутизация].</text:span></text:p>
      <text:p text:style-name="P20"><text:span text:style-name="Strong_20_Emphasis"><text:span text:style-name="T2">Почему именно так:</text:span></text:span></text:p>
      <text:list xml:id="list1093079901" text:style-name="L1">
        <text:list-item>
          <text:p text:style-name="P27"><text:soft-page-break/><text:span text:style-name="Strong_20_Emphasis"><text:span text:style-name="T2">Отсутствие избыточности:</text:span></text:span><text:span text:style-name="T1"> Наша сеть компактна. Дробление трех роутеров на разные зоны только перегрузит их процессоры лишней работой по суммаризации маршрутов [Задание 3. Динамическая маршрутизация].</text:span></text:p>
        </text:list-item>
        <text:list-item>
          <text:p text:style-name="P28"><text:span text:style-name="Strong_20_Emphasis"><text:span text:style-name="T2">Прямая связность:</text:span></text:span><text:span text:style-name="T1"> Все три устройства (</text:span><text:span text:style-name="Source_20_Text"><text:span text:style-name="T10">R1 - R2 - R3</text:span></text:span><text:span text:style-name="T1">) становятся полноправными участниками единого магистрального ядра [Задание 3. Динамическая маршрутизация]. Они обмениваются Hello-пакетами напрямую, строят единую, кристально прозрачную базу данных сети (LSDB) и мгновенно реагируют на любые аварии (самоисцеление сети по Дейкстре за 1-2 секунды) [Задание 3. Динамическая маршрутизация].</text:span></text:p>
        </text:list-item>
      </text:list>
      <text:p text:style-name="Horizontal_20_Line"/>
      <text:p text:style-name="P26">🧭 <text:span text:style-name="T17">Твой комментарий к этому шагу (для сдачи ментору):</text:span></text:p>
      <text:p text:style-name="P3"><text:span text:style-name="Strong_20_Emphasis"><text:span text:style-name="T2">«Здесь ИИ предложил абсолютно верную промышленную адресацию: транзитные стыки /30 физически защищают кабели от подключения посторонних устройств. Предложенный вариант с единой Area 0 для всех трех роутеров является единственно верным, так как последовательное соединение изолированных зон без Backbone-ядра полностью нарушило бы логику OSPF»</text:span></text:span><text:span text:style-name="T1"> [Задание 3. Динамическая маршрутизация].</text:span></text:p>
      <text:p text:style-name="Horizontal_20_Line"/>
      <text:p text:style-name="Standard"/>
      <text:p text:style-name="P8"><text:span text:style-name="T20">Задание 2</text:span></text:p>
      <text:p text:style-name="P5"><text:span text:style-name="Emphasis"><text:span text:style-name="T1">Пользователь:</text:span></text:span><text:span text:style-name="T1"> «Почему R1 и R2 не переходят в состояние FULL?»<text:line-break/></text:span><text:span text:style-name="Emphasis"><text:span text:style-name="T1">AI-подсказка:</text:span></text:span><text:span text:style-name="T1"> «Проверьте правильность Wildcard-маски. Поскольку вы перешли на транзитные подсети /30, обратная маска в команде network должна быть строго 0.0.0.3, а не 0.0.0.255 [Задание 3. Динамическая маршрутизация]. Также убедитесь, что Router ID уникальны [Задание 3. Динамическая маршрутизация]».</text:span></text:p>
      <text:p text:style-name="P5"><text:span text:style-name="Strong_20_Emphasis"><text:span text:style-name="T2"/></text:span></text:p>
      <text:p text:style-name="P5"><text:span text:style-name="Strong_20_Emphasis"><text:span text:style-name="T2">Здесь AI оказался абсолютно прав. При первой ручной заливке конфигурации на R2 я по привычке указал маску 0.0.0.255 для транзитного стыка, из-за чего процесс OSPF не мог корректно сопоставить границы подсети /30 [Задание 3. Динамическая маршрутизация]. После исправления Wildcard-маски на точечную 0.0.0.3 на обоих роутерах, соседство мгновенно перешло в стабильный статус FULL .</text:span></text:span></text:p>
      <text:p text:style-name="Standard"/>
      <text:p text:style-name="Standard">R2#show ip ospf neighbor — <text:span text:style-name="T21">смотрим соседей</text:span></text:p>
      <text:p text:style-name="Standard"/>
      <text:p text:style-name="Standard">Neighbor ID <text:s text:c="4"/>Pri <text:s text:c="2"/>State <text:s text:c="10"/>Dead Time <text:s text:c="2"/>Address <text:s text:c="8"/>Interface</text:p>
      <text:p text:style-name="Standard">192.168.30.1 <text:s text:c="5"/>1 <text:s text:c="2"/>FULL/BDR <text:s text:c="7"/>00:00:36 <text:s text:c="3"/>10.10.23.2 <text:s text:c="5"/>FastEthernet0/1</text:p>
      <text:p text:style-name="Standard">192.168.10.1 <text:s text:c="5"/>1 <text:s text:c="2"/>FULL/DR <text:s text:c="8"/>00:00:31 <text:s text:c="3"/>10.10.12.1 <text:s text:c="5"/>FastEthernet0/0</text:p>
      <text:p text:style-name="Standard"/>
      <text:p text:style-name="Standard"/>
      <text:p text:style-name="Standard">R1#show running-config — <text:span text:style-name="T21">смотрим конфиг роутера (тут представлена часть относящаяся к ospf)</text:span></text:p>
      <text:p text:style-name="Standard"/>
      <text:p text:style-name="Standard">interface Loopback0</text:p>
      <text:p text:style-name="Standard"><text:s/>ip address 192.168.10.1 255.255.255.0</text:p>
      <text:p text:style-name="Standard">!</text:p>
      <text:p text:style-name="Standard"><text:soft-page-break/>interface FastEthernet0/0</text:p>
      <text:p text:style-name="Standard"><text:s/>ip address 10.10.12.1 255.255.255.252</text:p>
      <text:p text:style-name="Standard"><text:s/>duplex auto</text:p>
      <text:p text:style-name="Standard"><text:s/>speed auto</text:p>
      <text:p text:style-name="Standard">!</text:p>
      <text:p text:style-name="Standard">interface FastEthernet0/1</text:p>
      <text:p text:style-name="Standard"><text:s/>no ip address</text:p>
      <text:p text:style-name="Standard"><text:s/>shutdown</text:p>
      <text:p text:style-name="Standard"><text:s/>duplex auto</text:p>
      <text:p text:style-name="Standard"><text:s/>speed auto</text:p>
      <text:p text:style-name="Standard">!</text:p>
      <text:p text:style-name="Standard">router ospf 1</text:p>
      <text:p text:style-name="Standard"><text:s/>log-adjacency-changes</text:p>
      <text:p text:style-name="Standard"><text:s/>network 10.10.12.0 0.0.0.3 area 0</text:p>
      <text:p text:style-name="Standard"><text:s/>network 192.168.10.0 0.0.0.255 area 0</text:p>
      <text:p text:style-name="Standard">!</text:p>
      <text:p text:style-name="Standard"/>
      <text:p text:style-name="P11">ну или сокращенно:<text:line-break/>R1#show running-config | section router ospf</text:p>
      <text:p text:style-name="P11">router ospf 1</text:p>
      <text:p text:style-name="P11"><text:s/>log-adjacency-changes</text:p>
      <text:p text:style-name="P11"><text:s/>network 10.10.12.0 0.0.0.3 area 0</text:p>
      <text:p text:style-name="P11"><text:s/>network 192.168.10.0 0.0.0.255 area 0</text:p>
      <text:p text:style-name="P11"/>
      <text:p text:style-name="P11">R1#show ip ospf interface fastEthernet 0/0 <text:s/></text:p>
      <text:p text:style-name="P11">FastEthernet0/0 is up, line protocol is up </text:p>
      <text:p text:style-name="P11"><text:s text:c="2"/>Internet Address 10.10.12.1/30, Area 0 </text:p>
      <text:p text:style-name="P11"><text:s text:c="2"/>Process ID 1, Router ID 192.168.10.1, Network Type BROADCAST, Cost: 10</text:p>
      <text:p text:style-name="P11"><text:s text:c="2"/>Transmit Delay is 1 sec, State DR, Priority 1 </text:p>
      <text:p text:style-name="P11"><text:s text:c="2"/>Designated Router (ID) 192.168.10.1, Interface address 10.10.12.1</text:p>
      <text:p text:style-name="P11"><text:s text:c="2"/>Backup Designated router (ID) 10.10.23.1, Interface address 10.10.12.2</text:p>
      <text:p text:style-name="P11"><text:s text:c="2"/>Timer intervals configured, Hello 10, Dead 40, Wait 40, Retransmit 5</text:p>
      <text:p text:style-name="P11"><text:s text:c="4"/>oob-resync timeout 40</text:p>
      <text:p text:style-name="P11"><text:s text:c="4"/>Hello due in 00:00:05</text:p>
      <text:p text:style-name="P11"><text:s text:c="2"/>Supports Link-local Signaling (LLS)</text:p>
      <text:p text:style-name="P11"><text:s text:c="2"/>Index 1/1, flood queue length 0</text:p>
      <text:p text:style-name="P11"><text:s text:c="2"/>Next 0x0(0)/0x0(0)</text:p>
      <text:p text:style-name="P11"><text:s text:c="2"/>Last flood scan length is 0, maximum is 1</text:p>
      <text:p text:style-name="P11"><text:s text:c="2"/>Last flood scan time is 0 msec, maximum is 0 msec</text:p>
      <text:p text:style-name="P11"><text:s text:c="2"/>Neighbor Count is 1, Adjacent neighbor count is 1 </text:p>
      <text:p text:style-name="P11"><text:s text:c="4"/>Adjacent with neighbor 10.10.23.1 <text:s/>(Backup Designated Router)</text:p>
      <text:p text:style-name="P11"><text:s text:c="2"/>Suppress hello for 0 neighbor(s)</text:p>
      <text:p text:style-name="P11"/>
      <text:p text:style-name="P11"><text:span text:style-name="T16">🟢 </text:span><text:span text:style-name="Source_20_Text"><text:span text:style-name="T12">FastEthernet0/0 is up, line protocol is up</text:span></text:span></text:p>
      <text:list xml:id="list3912751835" text:style-name="L3">
        <text:list-item>
          <text:p text:style-name="P31"><text:span text:style-name="Strong_20_Emphasis"><text:span text:style-name="Source_20_Text"><text:span text:style-name="T12">FastEthernet0/0 is up</text:span></text:span></text:span><text:span text:style-name="T1"> — физический уровень (L1). Означает, что медный порт включен командой </text:span><text:span text:style-name="Source_20_Text"><text:span text:style-name="T10">no shutdown</text:span></text:span><text:span text:style-name="T1">, кабель исправен, и на нем есть электрический сигнал (в GNS3 точка горит зеленым) [Шаг 4].</text:span></text:p>
        </text:list-item>
        <text:list-item>
          <text:p text:style-name="P31"><text:span text:style-name="Strong_20_Emphasis"><text:span text:style-name="Source_20_Text"><text:span text:style-name="T12">line protocol is up</text:span></text:span></text:span><text:span text:style-name="T1"> — канальный уровень (L2). Означает, что роутер успешно договорился со своим соседом </text:span><text:span text:style-name="Source_20_Text"><text:span text:style-name="T10">R2</text:span></text:span><text:span text:style-name="T1"> о типе инкапсуляции кадра, скорости и дуплексе [Шаг 4]. Канал полностью готов гонять трафик.</text:span></text:p>
        </text:list-item>
      </text:list>
      <text:p text:style-name="P22"><text:span text:style-name="T16">🗺️ </text:span><text:span text:style-name="Source_20_Text"><text:span text:style-name="T12">Internet Address 10.10.12.1/30, Area 0</text:span></text:span></text:p>
      <text:list xml:id="list1910124684" text:style-name="L4">
        <text:list-item>
          <text:p text:style-name="P32"><text:soft-page-break/><text:span text:style-name="Strong_20_Emphasis"><text:span text:style-name="Source_20_Text"><text:span text:style-name="T12">10.10.12.1/30</text:span></text:span></text:span><text:span text:style-name="T1"> — IP-адрес и маска этого порта [Задание 3. Динамическая маршрутизация]. Наша узкая маска </text:span><text:span text:style-name="Source_20_Text"><text:span text:style-name="T10">/30</text:span></text:span><text:span text:style-name="T1"> математически запрещает хакеру вклиниться третьим лишним в этот кабель [Задание 1. Виртуальные сети].</text:span></text:p>
        </text:list-item>
        <text:list-item>
          <text:p text:style-name="P32"><text:span text:style-name="Strong_20_Emphasis"><text:span text:style-name="Source_20_Text"><text:span text:style-name="T12">Area 0</text:span></text:span></text:span><text:span text:style-name="T1"> — этот интерфейс официально зачислен в наше главное магистральное ядро OSPF (Backbone) [Задание 3. Динамическая маршрутизация].</text:span></text:p>
        </text:list-item>
      </text:list>
      <text:p text:style-name="P22"><text:span text:style-name="T16">🆔 </text:span><text:span text:style-name="Source_20_Text"><text:span text:style-name="T12">Process ID 1, Router ID 192.168.10.1, Network Type BROADCAST, Cost: 10</text:span></text:span></text:p>
      <text:list xml:id="list784742152" text:style-name="L5">
        <text:list-item>
          <text:p text:style-name="P33"><text:span text:style-name="Strong_20_Emphasis"><text:span text:style-name="Source_20_Text"><text:span text:style-name="T12">Process ID 1</text:span></text:span></text:span><text:span text:style-name="T1"> — номер локального процесса OSPF в оперативной памяти роутера [Задание 3. Динамическая маршрутизация].</text:span></text:p>
        </text:list-item>
        <text:list-item>
          <text:p text:style-name="P33"><text:span text:style-name="Strong_20_Emphasis"><text:span text:style-name="Source_20_Text"><text:span text:style-name="T12">Router ID 192.168.10.1</text:span></text:span></text:span><text:span text:style-name="T1"> — цифровой «паспорт» роутера </text:span><text:span text:style-name="Source_20_Text"><text:span text:style-name="T10">R1</text:span></text:span><text:span text:style-name="T1"> [Задание 3. Динамическая маршрутизация]. Он автоматически скопировал его со своей свободной сети Loopback, чтобы другие роутеры на карте Дейкстры не перепутали его с соседями [Задание 3. Динамическая маршрутизация].</text:span></text:p>
        </text:list-item>
        <text:list-item>
          <text:p text:style-name="P33"><text:span text:style-name="Strong_20_Emphasis"><text:span text:style-name="Source_20_Text"><text:span text:style-name="T12">Network Type BROADCAST</text:span></text:span></text:span><text:span text:style-name="T1"> — тип сети. Означает, что роутер считает этот кабель обычной общей средой Ethernet, где теоретически может быть подключено много устройств, поэтому здесь нужно проводить «выборы начальников» подсети [Задание 3. Динамическая маршрутизация].</text:span></text:p>
        </text:list-item>
        <text:list-item>
          <text:p text:style-name="P33"><text:span text:style-name="Strong_20_Emphasis"><text:span text:style-name="Source_20_Text"><text:span text:style-name="T12">Cost: 10</text:span></text:span></text:span><text:span text:style-name="T1"> — </text:span><text:span text:style-name="Strong_20_Emphasis"><text:span text:style-name="T2">математическая стоимость этого провода</text:span></text:span><text:span text:style-name="T1"> [Задание 3. Динамическая маршрутизация]. Для портов FastEthernet (100 Мбит/с) она аппаратно равна 10 [Задание 3. Динамическая маршрутизация]. Именно это число алгоритм Дейкстры берет за основу при подсчете кратчайшего пути [Задание 3. Динамическая маршрутизация].</text:span></text:p>
        </text:list-item>
      </text:list>
      <text:p text:style-name="P22"><text:span text:style-name="T16">⏱️ </text:span><text:span text:style-name="Source_20_Text"><text:span text:style-name="T12">Transmit Delay is 1 sec, State DR, Priority 1</text:span></text:span></text:p>
      <text:list xml:id="list3421880761" text:style-name="L6">
        <text:list-item>
          <text:p text:style-name="P34"><text:span text:style-name="Strong_20_Emphasis"><text:span text:style-name="Source_20_Text"><text:span text:style-name="T12">Transmit Delay is 1 sec</text:span></text:span></text:span><text:span text:style-name="T1"> — время (1 секунда), которое роутер закладывает на микрозадержку при пересылке пакета обновления карты (LSA) в этот кабель.</text:span></text:p>
        </text:list-item>
        <text:list-item>
          <text:p text:style-name="P34"><text:span text:style-name="Strong_20_Emphasis"><text:span text:style-name="Source_20_Text"><text:span text:style-name="T12">State DR</text:span></text:span></text:span><text:span text:style-name="T1"> — статус роутера в этом проводе. Сам </text:span><text:span text:style-name="Source_20_Text"><text:span text:style-name="T10">R1</text:span></text:span><text:span text:style-name="T1"> выиграл выборы и стал главным выделенным маршрутизатором подсети (Designated Router) [Задание 3. Динамическая маршрутизация].</text:span></text:p>
        </text:list-item>
        <text:list-item>
          <text:p text:style-name="P34"><text:span text:style-name="Strong_20_Emphasis"><text:span text:style-name="Source_20_Text"><text:span text:style-name="T12">Priority 1</text:span></text:span></text:span><text:span text:style-name="T1"> — вес роутера на выборах. Чем выше приоритет (от 0 до 255), тем больше шансов стать главным. </text:span><text:span text:style-name="Source_20_Text"><text:span text:style-name="T10">1</text:span></text:span><text:span text:style-name="T1"> — стандартный дефолт. Если прописать приоритет </text:span><text:span text:style-name="Source_20_Text"><text:span text:style-name="T10">0</text:span></text:span><text:span text:style-name="T1">, роутер навсегда откажется от власти и никогда не станет боссом подсети.</text:span></text:p>
        </text:list-item>
      </text:list>
      <text:p text:style-name="P22"><text:span text:style-name="T16">👑 </text:span><text:span text:style-name="Source_20_Text"><text:span text:style-name="T12">Designated Router (ID) 192.168.10.1, Interface address 10.10.12.1</text:span></text:span></text:p>
      <text:list xml:id="list1151819924" text:style-name="L7">
        <text:list-item>
          <text:p text:style-name="P35"><text:span text:style-name="T1">Подтверждение выборов: роутер сообщает, что главным боссом подсети (</text:span><text:span text:style-name="Source_20_Text"><text:span text:style-name="T10">DR</text:span></text:span><text:span text:style-name="T1">) является устройство с паспортом </text:span><text:span text:style-name="Source_20_Text"><text:span text:style-name="T10">192.168.10.1</text:span></text:span><text:span text:style-name="T1"> (то есть он сам) и его IP-адрес в этом проводе равен </text:span><text:span text:style-name="Source_20_Text"><text:span text:style-name="T10">10.10.12.1</text:span></text:span><text:span text:style-name="T1"> [Задание 3. Динамическая маршрутизация].</text:span></text:p>
        </text:list-item>
      </text:list>
      <text:p text:style-name="P22"><text:span text:style-name="T16">🛡️ </text:span><text:span text:style-name="Source_20_Text"><text:span text:style-name="T12">Backup Designated router (ID) 10.10.23.1, Interface address 10.10.12.2</text:span></text:span></text:p>
      <text:list xml:id="list228723759" text:style-name="L8">
        <text:list-item>
          <text:p text:style-name="P36"><text:span text:style-name="T1">Роутер сообщает, что резервным боссом подсети (</text:span><text:span text:style-name="Source_20_Text"><text:span text:style-name="T10">BDR</text:span></text:span><text:span text:style-name="T1">), готовым подхватить управление при аварии, выбран сосед с паспортом </text:span><text:span text:style-name="Source_20_Text"><text:span text:style-name="T10">10.10.23.1</text:span></text:span><text:span text:style-name="T1"> (это наш средний роутер </text:span><text:span text:style-name="Strong_20_Emphasis"><text:span text:style-name="Source_20_Text"><text:span text:style-name="T12">R2</text:span></text:span></text:span><text:span text:style-name="T1">), и его IP на этом конце равен </text:span><text:span text:style-name="Source_20_Text"><text:span text:style-name="T10">10.10.12.2</text:span></text:span><text:span text:style-name="T1"> [Задание 3. Динамическая маршрутизация].</text:span></text:p>
        </text:list-item>
      </text:list>
      <text:p text:style-name="P22"><text:span text:style-name="T16">⏲️ </text:span><text:span text:style-name="Source_20_Text"><text:span text:style-name="T12">Timer intervals configured, Hello 10, Dead 40, Wait 40, Retransmit 5</text:span></text:span></text:p>
      <text:list xml:id="list1621818867" text:style-name="L9">
        <text:list-item>
          <text:p text:style-name="P37"><text:span text:style-name="Strong_20_Emphasis"><text:span text:style-name="Source_20_Text"><text:span text:style-name="T12">Hello 10</text:span></text:span></text:span><text:span text:style-name="T1"> — роутер стреляет Hello-пакетами раз в 10 секунд для проверки «пульса» соседа [Задание 3. Динамическая маршрутизация].</text:span></text:p>
        </text:list-item>
        <text:list-item>
          <text:p text:style-name="P37"><text:span text:style-name="Strong_20_Emphasis"><text:span text:style-name="Source_20_Text"><text:span text:style-name="T12">Dead 40</text:span></text:span></text:span><text:span text:style-name="T1"> — если сосед замолчит на 40 секунд, </text:span><text:span text:style-name="Source_20_Text"><text:span text:style-name="T10">R1</text:span></text:span><text:span text:style-name="T1"> объявит его мертвым и сотрет маршруты, запустив экстренный пересчет карты по Дейкстре [Задание 3. Динамическая маршрутизация].</text:span></text:p>
        </text:list-item>
        <text:list-item>
          <text:p text:style-name="P37"><text:soft-page-break/><text:span text:style-name="Strong_20_Emphasis"><text:span text:style-name="Source_20_Text"><text:span text:style-name="T12">Wait 40</text:span></text:span></text:span><text:span text:style-name="T1"> — время ожидания в секундах перед началом выборов </text:span><text:span text:style-name="Source_20_Text"><text:span text:style-name="T10">DR/BDR</text:span></text:span><text:span text:style-name="T1"> после включения порта.</text:span></text:p>
        </text:list-item>
        <text:list-item>
          <text:p text:style-name="P37"><text:span text:style-name="Strong_20_Emphasis"><text:span text:style-name="Source_20_Text"><text:span text:style-name="T12">Retransmit 5</text:span></text:span></text:span><text:span text:style-name="T1"> — если роутер отправил соседу кусок карты (LSA), он будет ждать подтверждения ровно 5 секунд. Если ответа нет, он продублирует отправку.</text:span></text:p>
        </text:list-item>
      </text:list>
      <text:p text:style-name="P22"><text:span text:style-name="T16">⌛ </text:span><text:span text:style-name="Source_20_Text"><text:span text:style-name="T12">oob-resync timeout 40</text:span></text:span><text:span text:style-name="T6"> / </text:span><text:span text:style-name="Source_20_Text"><text:span text:style-name="T12">Hello due in 00:00:05</text:span></text:span></text:p>
      <text:list xml:id="list209214090" text:style-name="L10">
        <text:list-item>
          <text:p text:style-name="P38"><text:span text:style-name="Strong_20_Emphasis"><text:span text:style-name="Source_20_Text"><text:span text:style-name="T12">oob-resync timeout 40</text:span></text:span></text:span><text:span text:style-name="T1"> — тайм-аут (40 секунд) для внеполосной синхронизации баз данных при перезагрузке процесса.</text:span></text:p>
        </text:list-item>
        <text:list-item>
          <text:p text:style-name="P38"><text:span text:style-name="Strong_20_Emphasis"><text:span text:style-name="Source_20_Text"><text:span text:style-name="T12">Hello due in 00:00:05</text:span></text:span></text:span><text:span text:style-name="T1"> — живой таймер отсчета. Означает, что роутер выстрелит следующим Hello-пакетом в кабель ровно через 5 секунд.</text:span></text:p>
        </text:list-item>
      </text:list>
      <text:p text:style-name="P11"/>
      <text:p text:style-name="P11"/>
      <text:p text:style-name="P30"><text:span text:style-name="Strong_20_Emphasis"><text:span text:style-name="Source_20_Text"><text:span text:style-name="T12">State DR</text:span></text:span></text:span><text:span text:style-name="Strong_20_Emphasis"><text:span text:style-name="T2"> (Designated Router — Выделенный роутер):</text:span></text:span><text:span text:style-name="T1"><text:line-break/>Это главный босс подсети. В вашем логе написано: </text:span><text:span text:style-name="Source_20_Text"><text:span text:style-name="T10">Designated Router (ID) 192.168.10.1</text:span></text:span><text:span text:style-name="T1"> [Задание 3. Динамическая маршрутизация]. То есть сам ваш роутер </text:span><text:span text:style-name="Strong_20_Emphasis"><text:span text:style-name="Source_20_Text"><text:span text:style-name="T12">R1</text:span></text:span></text:span><text:span text:style-name="Strong_20_Emphasis"><text:span text:style-name="T2"> выиграл выборы и стал главным DR-маршрутизатором</text:span></text:span><text:span text:style-name="T1"> в этом проводе [Задание 3. Динамическая маршрутизация]! Теперь все остальные устройства в этой подсети обязаны отправлять свои обновления карт (LSA) строго ему на стол, а он уже сам централизованно рассылает их остальным.</text:span></text:p>
      <text:list xml:id="list3043753545" text:style-name="L2">
        <text:list-item>
          <text:p text:style-name="P29"><text:span text:style-name="Strong_20_Emphasis"><text:span text:style-name="Source_20_Text"><text:span text:style-name="T12">Backup Designated router (BDR)</text:span></text:span></text:span><text:span text:style-name="Strong_20_Emphasis"><text:span text:style-name="T2"> (Резервный выделенный роутер):</text:span></text:span><text:span text:style-name="T1"><text:line-break/>Это «вице-президент» подсети. Ваш лог четко показывает: </text:span><text:span text:style-name="Source_20_Text"><text:span text:style-name="T10">Backup Designated router (ID) 10.10.23.1, Interface address 10.10.12.2</text:span></text:span><text:span text:style-name="T1"> [Задание 3. Динамическая маршрутизация]. Эту должность занял ваш средний роутер </text:span><text:span text:style-name="Strong_20_Emphasis"><text:span text:style-name="Source_20_Text"><text:span text:style-name="T12">R2</text:span></text:span></text:span><text:span text:style-name="T1"> [Задание 3. Динамическая маршрутизация]. Он молча сидит в фоне, слушает трафик и дублирует базу данных карт. Если роутер </text:span><text:span text:style-name="Source_20_Text"><text:span text:style-name="T10">R1</text:span></text:span><text:span text:style-name="T1"> физически «умрет» или хакер отключит его DoS-атакой, </text:span><text:span text:style-name="Source_20_Text"><text:span text:style-name="T10">R2</text:span></text:span><text:span text:style-name="T1"> за миллисекунды подхватит обязанности главного </text:span><text:span text:style-name="Source_20_Text"><text:span text:style-name="T10">DR</text:span></text:span><text:span text:style-name="T1">, и пользователи даже не заметят сбоя в маршрутизации [Задание 3. Динамическая маршрутизация]!</text:span></text:p>
        </text:list-item>
      </text:list>
      <text:p text:style-name="P13"><text:span text:style-name="T7">Задание </text:span><text:span text:style-name="T8">3</text:span></text:p>
      <text:p text:style-name="P12"/>
      <text:p text:style-name="P25">[Задание 3. Динамическая маршрутизация].</text:p>
      <text:p text:style-name="P26">🗺️ <text:span text:style-name="T17">Математический граф нашей сети в памяти OSPF:</text:span></text:p>
      <text:p text:style-name="P24">text</text:p>
      <text:p text:style-name="P1"><text:span text:style-name="Source_20_Text"><text:span text:style-name="T16"><text:s text:c="2"/></text:span></text:span><text:span text:style-name="Source_20_Text"><text:span text:style-name="T9">[Lo0: 192.168.10.0/24]</text:span></text:span></text:p>
      <text:p text:style-name="P2"><text:span text:style-name="Source_20_Text"><text:span text:style-name="T16"><text:s text:c="12"/>│</text:span></text:span></text:p>
      <text:p text:style-name="P2"><text:span text:style-name="Source_20_Text"><text:span text:style-name="T16"><text:s text:c="12"/>│ </text:span></text:span><text:span text:style-name="Source_20_Text"><text:span text:style-name="T9">(Cost: 1)</text:span></text:span></text:p>
      <text:p text:style-name="P2"><text:span text:style-name="Source_20_Text"><text:span text:style-name="T16"><text:s text:c="12"/>▼</text:span></text:span></text:p>
      <text:p text:style-name="P2"><text:span text:style-name="Source_20_Text"><text:span text:style-name="T16"><text:s text:c="9"/></text:span></text:span><text:span text:style-name="Source_20_Text"><text:span text:style-name="T9">( <text:s/>R1 <text:s/>)</text:span></text:span></text:p>
      <text:p text:style-name="P2"><text:span text:style-name="Source_20_Text"><text:span text:style-name="T16"><text:s text:c="12"/>│</text:span></text:span></text:p>
      <text:p text:style-name="P2"><text:span text:style-name="Source_20_Text"><text:span text:style-name="T16"><text:s text:c="12"/>│ </text:span></text:span><text:span text:style-name="Source_20_Text"><text:span text:style-name="T9">(Cost: 10) ─── [Кабель Fa0/0: подсеть 10.10.12.0/30]</text:span></text:span></text:p>
      <text:p text:style-name="P2"><text:span text:style-name="Source_20_Text"><text:span text:style-name="T16"><text:s text:c="12"/>▼</text:span></text:span></text:p>
      <text:p text:style-name="P2"><text:span text:style-name="Source_20_Text"><text:span text:style-name="T16"><text:s text:c="9"/></text:span></text:span><text:span text:style-name="Source_20_Text"><text:span text:style-name="T9">( <text:s/>R2 <text:s/>)</text:span></text:span></text:p>
      <text:p text:style-name="P2"><text:span text:style-name="Source_20_Text"><text:span text:style-name="T16"><text:s text:c="12"/>│</text:span></text:span></text:p>
      <text:p text:style-name="P2"><text:span text:style-name="Source_20_Text"><text:span text:style-name="T16"><text:s text:c="12"/>│ </text:span></text:span><text:span text:style-name="Source_20_Text"><text:span text:style-name="T9">(Cost: 10) ─── [Кабель Fa0/1: подсеть 10.10.23.0/30]</text:span></text:span></text:p>
      <text:p text:style-name="P2"><text:span text:style-name="Source_20_Text"><text:span text:style-name="T16"><text:s text:c="12"/>▼</text:span></text:span></text:p>
      <text:p text:style-name="P2"><text:span text:style-name="Source_20_Text"><text:span text:style-name="T16"><text:s text:c="9"/></text:span></text:span><text:span text:style-name="Source_20_Text"><text:span text:style-name="T9">( <text:s/>R3 <text:s/>)</text:span></text:span></text:p>
      <text:p text:style-name="P2"><text:span text:style-name="Source_20_Text"><text:span text:style-name="T16"><text:s text:c="12"/>│</text:span></text:span></text:p>
      <text:p text:style-name="P2"><text:soft-page-break/><text:span text:style-name="Source_20_Text"><text:span text:style-name="T16"><text:s text:c="12"/>│ </text:span></text:span><text:span text:style-name="Source_20_Text"><text:span text:style-name="T9">(Cost: 1)</text:span></text:span></text:p>
      <text:p text:style-name="P2"><text:span text:style-name="Source_20_Text"><text:span text:style-name="T16"><text:s text:c="12"/>▼</text:span></text:span></text:p>
      <text:p text:style-name="P2"><text:span text:style-name="Source_20_Text"><text:span text:style-name="T16"><text:s text:c="2"/></text:span></text:span><text:span text:style-name="Source_20_Text"><text:span text:style-name="T9">[Lo0: 192.168.30.0/24] 💻 (Целевой хост)</text:span></text:span></text:p>
      <text:p text:style-name="P12"/>
      <text:p text:style-name="P10">🔍 <text:span text:style-name="T17">Шаг 1: Анализ соседей корня (R1)</text:span></text:p>
      <text:p text:style-name="P6"><text:span text:style-name="T1">Роутер </text:span><text:span text:style-name="Source_20_Text"><text:span text:style-name="T10">R1</text:span></text:span><text:span text:style-name="T1"> заглядывает в свою базу данных (LSDB) и проверяет порты, подключенные к нему напрямую [Задание 3. Динамическая маршрутизация]:</text:span></text:p>
      <text:list xml:id="list2757491487" text:style-name="L12">
        <text:list-item>
          <text:p text:style-name="P39"><text:span text:style-name="T1">До собственной сети </text:span><text:span text:style-name="Strong_20_Emphasis"><text:span text:style-name="Source_20_Text"><text:span text:style-name="T12">Loopback0 (192.168.10.0/24)</text:span></text:span></text:span><text:span text:style-name="T1">: </text:span><text:span text:style-name="Source_20_Text"><text:span text:style-name="T10">0 + 1 = 1</text:span></text:span><text:span text:style-name="T1">.</text:span></text:p>
        </text:list-item>
        <text:list-item>
          <text:p text:style-name="P39"><text:span text:style-name="T1">До транзитного соседа </text:span><text:span text:style-name="Strong_20_Emphasis"><text:span text:style-name="Source_20_Text"><text:span text:style-name="T12">R2</text:span></text:span></text:span><text:span text:style-name="T1"> по физическому кабелю </text:span><text:span text:style-name="Source_20_Text"><text:span text:style-name="T10">Fa0/0</text:span></text:span><text:span text:style-name="T1">: </text:span><text:span text:style-name="Source_20_Text"><text:span text:style-name="T10">0 + 10 = 10</text:span></text:span><text:span text:style-name="T1"> [Задание 3. Динамическая маршрутизация].</text:span></text:p>
        </text:list-item>
      </text:list>
      <text:list xml:id="list3698486341" text:style-name="L13">
        <text:list-item>
          <text:p text:style-name="P40"><text:span text:style-name="Emphasis"><text:span text:style-name="T1">Итог шага:</text:span></text:span><text:span text:style-name="T1"> Из непосещенных вершин выбирается кандидат с наименьшим весом. Это вершина </text:span><text:span text:style-name="Strong_20_Emphasis"><text:span text:style-name="Source_20_Text"><text:span text:style-name="T12">R2</text:span></text:span></text:span><text:span text:style-name="T1"> со стоимостью </text:span><text:span text:style-name="Strong_20_Emphasis"><text:span text:style-name="Source_20_Text"><text:span text:style-name="T12">10</text:span></text:span></text:span><text:span text:style-name="T1">. Путь до нее фиксируется [Задание 3. Динамическая маршрутизация].</text:span></text:p>
        </text:list-item>
      </text:list>
      <text:p text:style-name="P26">🔀 <text:span text:style-name="T17">Шаг 2: Расширение графа через транзитный узел (R2)</text:span></text:p>
      <text:p text:style-name="P22"><text:span text:style-name="T1">Алгоритм Дейкстры перемещает указатель в точку </text:span><text:span text:style-name="Strong_20_Emphasis"><text:span text:style-name="Source_20_Text"><text:span text:style-name="T12">R2</text:span></text:span></text:span><text:span text:style-name="T1"> (текущий накопленный вес равен </text:span><text:span text:style-name="Strong_20_Emphasis"><text:span text:style-name="Source_20_Text"><text:span text:style-name="T12">10</text:span></text:span></text:span><text:span text:style-name="T1">). Через пакеты обновлений OSPF роутер </text:span><text:span text:style-name="Source_20_Text"><text:span text:style-name="T10">R2</text:span></text:span><text:span text:style-name="T1"> сообщает, что у него есть кабель до роутера </text:span><text:span text:style-name="Source_20_Text"><text:span text:style-name="T10">R3</text:span></text:span><text:span text:style-name="T1"> [Задание 3. Динамическая маршрутизация].</text:span></text:p>
      <text:list xml:id="list2947262205" text:style-name="L14">
        <text:list-item>
          <text:p text:style-name="P41"><text:span text:style-name="T1">Алгоритм пересчитывает стоимость пути до </text:span><text:span text:style-name="Source_20_Text"><text:span text:style-name="T10">R3</text:span></text:span><text:span text:style-name="T1">: </text:span><text:span text:style-name="Source_20_Text"><text:span text:style-name="T10">[Текущий вес R2] + [Стоимость стыка 10.10.23.0] = 10 + 10 = 20</text:span></text:span><text:span text:style-name="T1"> [Задание 3. Динамическая маршрутизация].</text:span></text:p>
        </text:list-item>
        <text:list-item>
          <text:p text:style-name="P41"><text:span text:style-name="Emphasis"><text:span text:style-name="T1">Итог шага:</text:span></text:span><text:span text:style-name="T1"> Кратчайший путь до вершины </text:span><text:span text:style-name="Strong_20_Emphasis"><text:span text:style-name="Source_20_Text"><text:span text:style-name="T12">R3</text:span></text:span></text:span><text:span text:style-name="T1"> заносится в таблицу кандидатов со значением </text:span><text:span text:style-name="Strong_20_Emphasis"><text:span text:style-name="Source_20_Text"><text:span text:style-name="T12">20</text:span></text:span></text:span><text:span text:style-name="T1"> [Задание 3. Динамическая маршрутизация].</text:span></text:p>
        </text:list-item>
      </text:list>
      <text:p text:style-name="P26">🎯 <text:span text:style-name="T17">Шаг 3: Попадание в целевую подсеть (R3)</text:span></text:p>
      <text:p text:style-name="P22"><text:span text:style-name="T1">Алгоритм перемещается в вершину </text:span><text:span text:style-name="Strong_20_Emphasis"><text:span text:style-name="Source_20_Text"><text:span text:style-name="T12">R3</text:span></text:span></text:span><text:span text:style-name="T1"> (накопленный вес равен </text:span><text:span text:style-name="Strong_20_Emphasis"><text:span text:style-name="Source_20_Text"><text:span text:style-name="T12">20</text:span></text:span></text:span><text:span text:style-name="T1">). Роутер </text:span><text:span text:style-name="Source_20_Text"><text:span text:style-name="T10">R3</text:span></text:span><text:span text:style-name="T1"> сообщает, что внутри его процессора запущена целевая свободная подсеть </text:span><text:span text:style-name="Source_20_Text"><text:span text:style-name="T10">Loopback0</text:span></text:span><text:span text:style-name="T1"> [Задание 3. Динамическая маршрутизация].</text:span></text:p>
      <text:list xml:id="list2899733078" text:style-name="L15">
        <text:list-item>
          <text:p text:style-name="P42"><text:span text:style-name="T1">Алгоритм делает финальный шаг к цели: </text:span><text:span text:style-name="Source_20_Text"><text:span text:style-name="T10">[Текущий вес R3] + [Стоимость интерфейса Lo0] = 20 + 1 = 21</text:span></text:span><text:span text:style-name="T1"> [Задание 3. Динамическая маршрутизация].</text:span></text:p>
        </text:list-item>
        <text:list-item>
          <text:p text:style-name="P42"><text:span text:style-name="Emphasis"><text:span text:style-name="T1">Итог шага:</text:span></text:span><text:span text:style-name="T1"> Цель достигнута. Минимальная стоимость доставки пакета от </text:span><text:span text:style-name="Source_20_Text"><text:span text:style-name="T10">R1</text:span></text:span><text:span text:style-name="T1"> до свободной подсети </text:span><text:span text:style-name="Source_20_Text"><text:span text:style-name="T10">R3</text:span></text:span><text:span text:style-name="T1"> составляет </text:span><text:span text:style-name="Strong_20_Emphasis"><text:span text:style-name="Source_20_Text"><text:span text:style-name="T12">21</text:span></text:span></text:span><text:span text:style-name="T1"> [Задание 3. Динамическая маршрутизация].</text:span></text:p>
        </text:list-item>
      </text:list>
      <text:p text:style-name="P12"/>
      <text:p text:style-name="P12">R1#show ip route ospf </text:p>
      <text:p text:style-name="P12"><text:s text:c="5"/>192.168.30.0/32 is subnetted, 1 subnets</text:p>
      <text:p text:style-name="P12">O <text:s text:c="6"/>192.168.30.1 [110/21] via 10.10.12.2, 00:41:15, FastEthernet0/0</text:p>
      <text:p text:style-name="P12"><text:s text:c="5"/>10.0.0.0/30 is subnetted, 2 subnets</text:p>
      <text:p text:style-name="P12">O <text:s text:c="6"/>10.10.23.0 [110/20] via 10.10.12.2, 00:41:15, FastEthernet0/0</text:p>
      <text:p text:style-name="P12"/>
      <text:p text:style-name="P12"><text:span text:style-name="T19">Алгоритм Дейкстры на основе базы данных LSDB пошагово рассчитал граф: 10 за первый физический кабель + 10 за второй кабель + 1 за виртуальный интерфейс Loopback роутера R3 . Итоговая стоимость пути (21) идеально совпала с метрикой в реальной таблице маршрутизации Cisco IOS в строке </text:span><text:span text:style-name="Source_20_Text"><text:span text:style-name="T13">[110/21]</text:span></text:span><text:span text:style-name="T19">, что наглядно доказывает математическую точность работы OSPF 'под капотом</text:span></text:p>
      <text:p text:style-name="P12"/>
      <text:p text:style-name="P12"/>
      <text:p text:style-name="P13"><text:soft-page-break/><text:span text:style-name="T7">Задание </text:span><text:span text:style-name="T8">4</text:span></text:p>
      <text:p text:style-name="P12"/>
      <text:p text:style-name="P12"><text:span text:style-name="Strong_20_Emphasis"><text:span text:style-name="T2">Лог диалога с AI:</text:span></text:span><text:span text:style-name="T1"><text:line-break/></text:span><text:span text:style-name="Emphasis"><text:span text:style-name="T1">Пользователь:</text:span></text:span><text:span text:style-name="T1"> «Какие атаки возможны на OSPF и как настроить MD5?»<text:line-break/></text:span><text:span text:style-name="Emphasis"><text:span text:style-name="T1">AI-подсказка:</text:span></text:span><text:span text:style-name="T1"> «Возможны атаки Route Injection (отравление карт) и Rogue Router (ложный сосед) [Задание 3. Динамическая маршрутизация]. Для защиты включите </text:span><text:span text:style-name="Source_20_Text"><text:span text:style-name="T10">area 0 authentication message-digest</text:span></text:span><text:span text:style-name="T1"> в процессе OSPF и задайте </text:span><text:span text:style-name="Source_20_Text"><text:span text:style-name="T10">ip ospf message-digest-key</text:span></text:span><text:span text:style-name="T1"> на интерфейсах».</text:span></text:p>
      <text:p text:style-name="P4"><text:span text:style-name="Strong_20_Emphasis"><text:span text:style-name="T2">Мой комментарий к подсказке ИИ:</text:span></text:span><text:span text:style-name="T1"><text:line-break/></text:span><text:span text:style-name="Strong_20_Emphasis"><text:span text:style-name="T2">Здесь AI дал исчерпывающую ИБ-консультацию. Я успешно внедрил криптографическую MD5-аутентификацию на всех транзитных стыках роутеров. Это полностью защитило периметр нашей Area 0: теперь появление в сети несанкционированного соседа хакера или попытка отравления таблицы маршрутизации аппаратно блокируются на уровне ядра Cisco IOS, так как без знания секретного ключа </text:span></text:span><text:span text:style-name="Strong_20_Emphasis"><text:span text:style-name="Source_20_Text"><text:span text:style-name="T12">school21pass</text:span></text:span></text:span><text:span text:style-name="Strong_20_Emphasis"><text:span text:style-name="T2"> любые пакеты OSPF сбрасываются как вредоносные.</text:span></text:span></text:p>
      <text:p text:style-name="P12"/>
      <text:p text:style-name="P14">configure terminal ! 1. Включаем проверку подписи MD5 для всей зоны 0 </text:p>
      <text:p text:style-name="P14"/>
      <text:p text:style-name="P14">router ospf 1 </text:p>
      <text:p text:style-name="P14">area 0 authentication message-digest</text:p>
      <text:p text:style-name="P14">exit </text:p>
      <text:p text:style-name="P14"/>
      <text:p text:style-name="P14">! 2. Задаем сам секретный ключ на физическом порту, который смотрит на R2 </text:p>
      <text:p text:style-name="P14">interface FastEthernet 0/0 ip ospf message-digest-key 1 md5 <text:span text:style-name="T22">admin</text:span> </text:p>
      <text:p text:style-name="P14">end </text:p>
      <text:p text:style-name="P14">write memory</text:p>
      <text:p text:style-name="P14"/>
      <text:p text:style-name="P15">проделываем то же самое для всех интерфейсов остальных роутеров</text:p>
      <text:p text:style-name="P15"/>
      <text:p text:style-name="P15"><text:span text:style-name="T1">Если вы сейчас встанете перехватом (</text:span><text:span text:style-name="Source_20_Text"><text:span text:style-name="T10">Start capture</text:span></text:span><text:span text:style-name="T1">) на любой кабель и введете в фильтре Wireshark слово </text:span><text:span text:style-name="Strong_20_Emphasis"><text:span text:style-name="Source_20_Text"><text:span text:style-name="T12">ospf</text:span></text:span></text:span><text:span text:style-name="T1"> :</text:span></text:p>
      <text:list xml:id="list3840057269" text:style-name="L16">
        <text:list-item>
          <text:p text:style-name="P43"><text:span text:style-name="T1">Откройте любой пакет </text:span><text:span text:style-name="Source_20_Text"><text:span text:style-name="T10">Hello Packet</text:span></text:span><text:span text:style-name="T1">.</text:span></text:p>
        </text:list-item>
        <text:list-item>
          <text:p text:style-name="P43"><text:span text:style-name="T1">Найдите строку </text:span><text:span text:style-name="Strong_20_Emphasis"><text:span text:style-name="Source_20_Text"><text:span text:style-name="T12">OSPF Header</text:span></text:span></text:span><text:span text:style-name="T1"> (Заголовок OSPF).</text:span></text:p>
        </text:list-item>
        <text:list-item>
          <text:p text:style-name="P43"><text:span text:style-name="T1">Посмотрите в поле </text:span><text:span text:style-name="Strong_20_Emphasis"><text:span text:style-name="Source_20_Text"><text:span text:style-name="T12">Auth Type</text:span></text:span></text:span><text:span text:style-name="T1"> (Тип аутентификации). Вместо старого значения </text:span><text:span text:style-name="Source_20_Text"><text:span text:style-name="T10">Null</text:span></text:span><text:span text:style-name="T1"> (Без защиты) там теперь гордо горит </text:span><text:span text:style-name="Strong_20_Emphasis"><text:span text:style-name="Source_20_Text"><text:span text:style-name="T12">Cryptographic (2)</text:span></text:span></text:span><text:span text:style-name="T1">.</text:span></text:p>
        </text:list-item>
        <text:list-item>
          <text:p text:style-name="P43"><text:span text:style-name="T1">Ниже в поле </text:span><text:span text:style-name="Strong_20_Emphasis"><text:span text:style-name="Source_20_Text"><text:span text:style-name="T12">Authentication Data</text:span></text:span></text:span><text:span text:style-name="T1"> вы увидите длинную строку из случайных букв и цифр — это и есть уникальный MD5-хэш пакета. Сам пароль </text:span><text:span text:style-name="Source_20_Text"><text:span text:style-name="T14">admin </text:span></text:span><text:span text:style-name="T1">в кабель не передается, хакер не сможет перехватить его.</text:span>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23:55:36.576180215</meta:creation-date>
    <dc:date>2026-06-18T00:56:14.281792633</dc:date>
    <meta:editing-duration>PT40M15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7" meta:paragraph-count="176" meta:word-count="2080" meta:character-count="14796" meta:non-whitespace-character-count="12559"/>
  </office:meta>
</office:document-meta>
</file>